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istemet multiuser:</text:span> Janë sisteme operative që lejojnë përdorimin e të njëjtit kompjuter nga shumë përdorues në të njëjtën kohë. Në sisteme të tilla secili përdorues ka llogarinë e vet dhe mund të punojë simultanisht me të tjerët, ndërkohë që burimet e makinës (processor, memorie, pajisje disk) ndahen ndërmjet tyre. Kjo arrihet me ndarje kohe (time-sharing), ku CPU dhe burimet e tjera u caktohen çdo përdoruesi në paketa të vogla kohore. <text:span text:style-name="Strong_20_Emphasis">Karakteristika kryesore:</text:span> - Shfrytëzim konkurrent i burimeve – p.sh. në një server Unix mund të lidhen njëkohësisht edhe dhjetëra përdorues me rrjet dhe të punojnë me aplikacione të ndryshme. - Llogari dhe privilegje – secili përdorues hyn me fjalëkalimin e vet dhe ka të dhëna të veçanta. - Ndarë-koha – proceset e çdo përdoruesi marrin shrudhuarje kohore në CPU, duke garantuar që s’ka përdorues që monopolizon sistemin. Shembuj tipikë: Unix/Linux, Windows Server, sistemi i operimit i superkompjuterëve, etj. <text:span text:style-name="Strong_20_Emphasis">Përmbledhje:</text:span> Sistemet multiuser lejojnë që “më shumë përdorues të kenë qasje njëkohësisht në burimet e të njëjtit kompjuter”, duke mundësuar punën e shumë njerëzve (p.sh. në banka, universitete) në të njëjtën kohë.</text:p>
      <text:list text:style-name="L1">
        <text:list-item>
          <text:p text:style-name="P1">Sigurojnë që nevojat e të gjithë përdoruesve të balancohen dhe se një problem i njërit (p.sh. rrjedhje programi) nuk ndikon te të tjerët.</text:p>
        </text:list-item>
        <text:list-item>
          <text:p text:style-name="P1">Shpërndajnë kohën e CPU-së mes proceseve të ndryshëm dhe mbështesin sistemin operativ me shumë llogari përdoruesish.</text:p>
        </text:list-item>
      </text:list>
      <text:p text:style-name="Text_20_body"><text:span text:style-name="Emphasis">Figura: Ripërtëritje e pajisjeve në një qendër serverësh – shembull i mjedisit ku veprojnë sistemet operative multiuser, që lidhen me shumë përdorues në rrjet.</text:span></text:p>
      <text:h text:style-name="Heading_20_2" text:outline-level="2">Multitasking vs Single-tasking</text:h>
      <text:p text:style-name="Text_20_body"><text:span text:style-name="Strong_20_Emphasis">Njëdetyrësh (Single-tasking):</text:span> Ky lloj sistemi operativ lejon ekzekutimin e vetëm një programi në çdo kohë. Në praktikë, sistemi mundëson që një përdorues të ekzekutojë vetëm një veprim në një moment. Kjo do të thotë që CPU-ja punon vetëm me një proces dhe program tjetër ekzekutohet vetëm pasi të ketë përfunduar i pari. Për shembull, sistemet e vjetra të xhepit Palm ose DOS-u i parë (MS-DOS) ishin vetëmnjëdetyrësh. Karakteristikat: - CPU ekzekuton vetëm një proces, pa ndërprerje. - Rrugëtimi i detyrave është shumë i thjeshtë, por eficienca e përdorimit të burimeve është e ulët. - Shembuj: MS-DOS i hershëm, shumë sisteme të “embeded” të thjeshtë (smartphones të vjetër).</text:p>
      <text:p text:style-name="Text_20_body"><text:span text:style-name="Strong_20_Emphasis">Shumëdetyrësh (Multitasking):</text:span> Në këto sisteme mundësohet ekzekutimi i shumë programeve në të njëjtën kohë. Kjo arrihet përmes ndarjes së kohës së CPU-së ndërmjet proceseve të ndryshme. Në praktikë, CPU punon për disa milisekonda me një program e pastaj kalon te një tjetër, duke krijuar përshtypjen se të dy proceset ekzekutohen paralelisht. Modernisht ekzistojnë dy mënyra: preemtive (sistemi ndërpret proceset sipas orarit të planifikimit) ose kooperativ (proceset vetë i dhurojnë kohë procesorit). Çelësi është që <text:span text:style-name="Strong_20_Emphasis">multitaskingu</text:span> mundëson që një përdorues të punojë me disa aplikacione njëkohësisht – p.sh. ndërkohë që shkruan një dokument në tekst-përpunues, ai mund të shkarkojë në internet një dokument tjetër. Ajo që e bën mundës këtë është se sistemi operativ “lejon më tepër procese softuerike të veprojnë në të njëjtën kohë”. Karakteristikat: - CPU ndan burimet mes proceseve të shumta. - Shembuj: Windows, Linux, Mac OS etj. lejojnë shumë program njëherësh (browser, tekst-editor, lojëra, etj.), edhe pse përdoruesi është vetëm.</text:p>
      <text:list text:style-name="L2">
        <text:list-item>
          <text:p text:style-name="P2"><text:span text:style-name="Strong_20_Emphasis">Dallimet kryesore:</text:span> Sistemi shumëdetyrësh mund të ekzekutojë shumë programe në të njëjtën kohë, duke rritur efikasitetin e punës; ndërsa sistemi njëdetyrësh mund të qëndrojë i papunë (idle) kur programi aktual pret (p.sh. për hyrje-dalje).</text:p>
        </text:list-item>
      </text:list>
      <text:p text:style-name="Text_20_body"><text:soft-page-break/><text:span text:style-name="Emphasis">Figura: Përvojë pune në kodim dhe multi-tasking – në sistemet moderne lejohet punimi me disa aplikacione njëkohësisht (p.sh. editor teksti, navigues interneti, etj.).</text:span></text:p>
      <text:h text:style-name="Heading_20_2" text:outline-level="2">Multiuser vs Single-user</text:h>
      <text:p text:style-name="Text_20_body"><text:span text:style-name="Strong_20_Emphasis">Njëpërdorues (Single-user):</text:span> Sistemi operativ lejon vetëm një përdorues të vetëm në çdo kohë. Kjo nënkupton që vetëm një person (shpesh administrator i sistemeve) mund të hyjë dhe të përdorë kompjuterin në një sesion pune. Për shembull, në MAS-DOS standard vetëm një përdorues mund të punojë drejtpërdrejt me makinën dhe mund të ekzekutojë vetëm një detyrë në të njëjtën kohë. Sistemet operative të PC-ve personal, si Windows 10 në përdorim familjar, janë primarisht single-user edhe pse mbështesin profile të shumta; në thelb, vetëm një person në kompjuter përseance. Karakteristikat: - Nuk kanë nevojë për menaxhim kompleks të përdoruesve ose rrjete. - Burimet i jepen vetëm një përdoruesi; nuk ka kontraburim midis përdoruesve. - Shembuj: DOS i vjetër, Windows jo-server, Mac OS X pa konfigurim rrjeti, Android/iOS në telefonat celular.</text:p>
      <text:p text:style-name="Text_20_body"><text:span text:style-name="Strong_20_Emphasis">Shumëpërdorues (Multi-user):</text:span> Siç u përmend, sisteme operative si Unix/Linux janë dizajnuar që të lejojnë shumë përdorues të lidhur njëkohësisht (në vend, në rrjet ose terminale të ndryshme). Në këto sisteme çdo përdorues hyn me llogarinë e vet dhe mund të përdorë burimet e përbashkëta. Për shembull, një server Unix mundëson që dhjetëra studentë të lidhen njëkohësisht përmes terminaleve rrjetore dhe të punojnë me të njëjtat fajlla në hard disk. Ndryshe nga sistemi single-user, këtu duhet të ketë kujdes të veçantë për sigurinë dhe shfrytëzimin e burimeve: sistemi duhet të kujdeset që probleme të papritura të një përdoruesi të mos prishin punën e të tjerëve.</text:p>
      <text:list text:style-name="L3">
        <text:list-item>
          <text:p text:style-name="P3"><text:span text:style-name="Strong_20_Emphasis">Dallimet kryesore:</text:span> Në sistemet <text:span text:style-name="Strong_20_Emphasis">shumëpërdorues</text:span> (p.sh. Unix, Linux, Windows Server) shumë persona mund të punojnë njëkohësisht në të njëjtin sistem dhe mund të ndajnë burime komunale. Në sistemet <text:span text:style-name="Strong_20_Emphasis">njëpërdorues</text:span> (p.sh. MS-DOS, versionet standard të Windows/Mac) vetëm një person mund të jetë aktiv dhe të përdorë kompjuterin në çdo sesion. Praktikisht, shpesh përdoruesit e sistemeve single-user mund të përdorin rrjetin për të ndarë skedarë, por vetë OS-ja bazë mbetet me një përdorues aktiv në kompjute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04:08:47.206072026</meta:creation-date>
    <dc:date>2026-02-05T04:09:27.344594229</dc:date>
    <meta:editing-duration>PT40S</meta:editing-duration>
    <meta:editing-cycles>1</meta:editing-cycles>
    <meta:document-statistic meta:table-count="0" meta:image-count="0" meta:object-count="0" meta:page-count="2" meta:paragraph-count="13" meta:word-count="870" meta:character-count="5754" meta:non-whitespace-character-count="4895"/>
    <meta:generator>LibreOffice/24.2.7.2$Linux_X86_64 LibreOffice_project/420$Build-2</meta:generator>
  </office:meta>
</office:document-meta>
</file>