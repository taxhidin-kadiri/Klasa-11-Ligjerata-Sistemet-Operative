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Text_20_body">
      <style:text-properties fo:color="#000000" loext:opacity="100%" style:font-name="Times New Roman" fo:font-size="12pt" fo:language="sq" fo:country="AL" style:text-underline-style="none" fo:font-weight="normal" officeooo:rsid="00153d70" officeooo:paragraph-rsid="00153d70" style:font-size-asian="12pt" style:font-weight-asian="normal" style:font-name-complex="Times New Roman1" style:font-size-complex="12pt" style:font-weight-complex="normal"/>
    </style:style>
    <style:style style:name="P2" style:family="paragraph" style:parent-style-name="Heading">
      <style:paragraph-properties fo:break-before="page"/>
      <style:text-properties fo:color="#000000" loext:opacity="100%" fo:language="sq" fo:country="AL" style:text-underline-style="solid" style:text-underline-width="auto" style:text-underline-color="font-color" officeooo:paragraph-rsid="001ae4e4" style:font-size-complex="14pt"/>
    </style:style>
    <style:style style:name="P3" style:family="paragraph" style:parent-style-name="Heading">
      <style:text-properties fo:color="#000000" loext:opacity="100%" fo:language="sq" fo:country="AL" style:text-underline-style="solid" style:text-underline-width="auto" style:text-underline-color="font-color" officeooo:paragraph-rsid="001ae4e4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font-name="Times New Roman1" fo:font-size="14pt" fo:language="sq" fo:country="AL" fo:font-weight="bold" officeooo:paragraph-rsid="001ae4e4" style:font-size-asian="14pt" style:font-weight-asian="bold" style:font-name-complex="Times New Roman1" style:font-size-complex="14pt"/>
    </style:style>
    <style:style style:name="P5" style:family="paragraph" style:parent-style-name="Standard">
      <style:text-properties fo:color="#000000" loext:opacity="100%" style:font-name="Times New Roman1" fo:font-size="12pt" fo:language="sq" fo:country="AL" fo:font-weight="bold" officeooo:paragraph-rsid="001ae4e4" style:font-size-asian="12pt" style:font-weight-asian="bold" style:font-name-complex="Times New Roman1" style:font-size-complex="12pt"/>
    </style:style>
    <style:style style:name="P6" style:family="paragraph" style:parent-style-name="Standard">
      <style:text-properties officeooo:paragraph-rsid="001ae4e4"/>
    </style:style>
    <style:style style:name="P7" style:family="paragraph" style:parent-style-name="Standard" style:list-style-name="WW8Num177">
      <style:text-properties fo:color="#000000" loext:opacity="100%" style:font-name="Times New Roman1" fo:font-size="12pt" fo:language="sq" fo:country="AL" officeooo:paragraph-rsid="001ae4e4" style:font-size-asian="12pt" style:font-name-complex="Times New Roman1"/>
    </style:style>
    <style:style style:name="P8" style:family="paragraph" style:parent-style-name="Standard" style:list-style-name="WW8Num177">
      <style:text-properties fo:color="#000000" loext:opacity="100%" style:font-name="Times New Roman1" fo:font-size="12pt" fo:language="sq" fo:country="AL" officeooo:paragraph-rsid="001ae4e4" style:font-size-asian="12pt" style:font-name-complex="Times New Roman1" style:font-size-complex="12pt"/>
    </style:style>
    <style:style style:name="P9" style:family="paragraph" style:parent-style-name="Standard" style:list-style-name="WW8Num177">
      <style:text-properties officeooo:paragraph-rsid="001ae4e4"/>
    </style:style>
    <style:style style:name="P10" style:family="paragraph" style:parent-style-name="Standard" style:list-style-name="WW8Num177">
      <style:paragraph-properties fo:text-align="justify" style:justify-single-word="false"/>
      <style:text-properties fo:color="#000000" loext:opacity="100%" style:font-name="Times New Roman1" fo:font-size="12pt" fo:language="sq" fo:country="AL" fo:font-weight="bold" officeooo:paragraph-rsid="001ae4e4" style:font-size-asian="12pt" style:font-weight-asian="bold" style:font-name-complex="Times New Roman1" style:font-size-complex="12pt"/>
    </style:style>
    <style:style style:name="P11" style:family="paragraph" style:parent-style-name="Standard" style:list-style-name="WW8Num177">
      <style:paragraph-properties>
        <style:tab-stops>
          <style:tab-stop style:position="0.6252in"/>
        </style:tab-stops>
      </style:paragraph-properties>
      <style:text-properties fo:color="#000000" loext:opacity="100%" style:font-name="Times New Roman1" fo:font-size="12pt" fo:language="sq" fo:country="AL" officeooo:paragraph-rsid="001ae4e4" style:font-size-asian="12pt" style:font-name-complex="Times New Roman1"/>
    </style:style>
    <style:style style:name="P12" style:family="paragraph" style:parent-style-name="Standard" style:list-style-name="WW8Num177">
      <style:paragraph-properties>
        <style:tab-stops>
          <style:tab-stop style:position="0.6252in"/>
        </style:tab-stops>
      </style:paragraph-properties>
      <style:text-properties officeooo:paragraph-rsid="001ae4e4"/>
    </style:style>
    <style:style style:name="P13" style:family="paragraph" style:parent-style-name="Standard">
      <style:paragraph-properties fo:text-align="justify" style:justify-single-word="false"/>
      <style:text-properties fo:color="#000000" loext:opacity="100%" style:font-name="Times New Roman1" fo:font-size="12pt" fo:language="sq" fo:country="AL" fo:font-weight="bold" officeooo:paragraph-rsid="001ae4e4" style:font-size-asian="12pt" style:font-weight-asian="bold" style:font-name-complex="Times New Roman1" style:font-size-complex="12pt"/>
    </style:style>
    <style:style style:name="P14" style:family="paragraph" style:parent-style-name="Standard" style:list-style-name="WW8Num26">
      <style:paragraph-properties fo:text-align="justify" style:justify-single-word="false"/>
      <style:text-properties fo:color="#000000" loext:opacity="100%" style:font-name="Times New Roman1" fo:font-size="12pt" fo:language="sq" fo:country="AL" officeooo:paragraph-rsid="001ae4e4" style:font-size-asian="12pt" style:font-name-complex="Times New Roman1"/>
    </style:style>
    <style:style style:name="T1" style:family="text">
      <style:text-properties officeooo:rsid="0019aecd"/>
    </style:style>
    <style:style style:name="T2" style:family="text">
      <style:text-properties fo:color="#000000" loext:opacity="100%" style:font-name="Times New Roman1" fo:font-size="12pt" fo:language="sq" fo:country="AL" style:text-underline-style="solid" style:text-underline-width="auto" style:text-underline-color="font-color" fo:font-weight="bold" style:font-size-asian="12pt" style:font-weight-asian="bold" style:font-name-complex="Times New Roman1" style:font-size-complex="12pt"/>
    </style:style>
    <style:style style:name="T3" style:family="text">
      <style:text-properties fo:color="#000000" loext:opacity="100%" style:font-name="Times New Roman1" fo:font-size="12pt" fo:language="sq" fo:country="AL" fo:font-weight="bold" style:font-size-asian="12pt" style:font-weight-asian="bold" style:font-name-complex="Times New Roman1" style:font-size-complex="12pt"/>
    </style:style>
    <style:style style:name="T4" style:family="text">
      <style:text-properties fo:color="#000000" loext:opacity="100%" style:font-name="Times New Roman1" fo:font-size="12pt" fo:language="sq" fo:country="AL" style:font-size-asian="12pt" style:font-name-complex="Times New Roman1" style:font-size-complex="12pt"/>
    </style:style>
    <style:style style:name="T5" style:family="text">
      <style:text-properties fo:color="#000000" loext:opacity="100%" style:font-name="Times New Roman1" fo:font-size="12pt" fo:language="sq" fo:country="AL" style:font-size-asian="12pt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gadite ligjeraten per mesimin shume te shkurter per microsoft word per programin e lëndës, shkruaj 1.5 fleta deri 2 fleta, shkruaj pjeset me te rendesishme dhe esenciale te mesojn nxenesit (te pershkruajne p<text:span text:style-name="T1">r</text:span>ej projektorit):</text:p>
      <text:p text:style-name="P2">Programi i lëndës</text:p>
      <text:p text:style-name="P3"/>
      <text:p text:style-name="P4">“Sistemet operative”</text:p>
      <text:p text:style-name="P5"/>
      <text:p text:style-name="P6"><text:span text:style-name="T2">Lëmi</text:span><text:span text:style-name="T3">:<text:tab/> Elektroteknikë</text:span></text:p>
      <text:p text:style-name="P6"><text:span text:style-name="T2">Profili</text:span><text:span text:style-name="T3">: Informatikë</text:span></text:p>
      <text:p text:style-name="P6"><text:span text:style-name="T2">Niveli</text:span><text:span text:style-name="T3">:<text:tab/> I</text:span></text:p>
      <text:p text:style-name="P6"><text:span text:style-name="T2">Klasa</text:span><text:span text:style-name="T3">:<text:tab/> 11</text:span></text:p>
      <text:p text:style-name="P5"/>
      <text:p text:style-name="P6"><text:span text:style-name="T3">I. <text:s text:c="3"/>Qëllimi i lëndës</text:span></text:p>
      <text:p text:style-name="P6"><text:span text:style-name="T4">Në përfundim të kësaj lënde, nxënësi duhet</text:span><text:span text:style-name="T5">:</text:span></text:p>
      <text:list text:style-name="WW8Num177">
        <text:list-item>
          <text:p text:style-name="P7" loext:marker-style-name="T5">të shpjegojë ç’janë sistemet operative dhe programet softuerike;</text:p>
        </text:list-item>
        <text:list-item>
          <text:p text:style-name="P7" loext:marker-style-name="T5">të shpjegojë ndikimin e teknologjisë së informacionit në shoqëri;</text:p>
        </text:list-item>
        <text:list-item>
          <text:p text:style-name="P7" loext:marker-style-name="T5">të përdorë teknologjinë e informacionit në shërbim të shoqërisë;</text:p>
        </text:list-item>
        <text:list-item>
          <text:p text:style-name="P7" loext:marker-style-name="T5">të përdorë programet kompjuterike të ndryshme;</text:p>
        </text:list-item>
        <text:list-item>
          <text:p text:style-name="P8" loext:marker-style-name="T5">të përkufizojë sistemin operativ dhe të numërojë llojet dhe strukturën e tyre;</text:p>
        </text:list-item>
        <text:list-item>
          <text:p text:style-name="P8" loext:marker-style-name="T5">të gjejë dhe të instalojë softuerë për sistemin operativ;</text:p>
        </text:list-item>
        <text:list-item>
          <text:p text:style-name="P7" loext:marker-style-name="T5">të dallojë nevojat bashkëkohore të zhvillimit të softuerëve në lëmin e sistemit operativ;</text:p>
        </text:list-item>
        <text:list-item>
          <text:p text:style-name="P7" loext:marker-style-name="T5">të zbatojë standardet në lëmin e sistemit operativ;</text:p>
        </text:list-item>
        <text:list-item>
          <text:p text:style-name="P7" loext:marker-style-name="T5">të zgjedhë sistemin operativ;</text:p>
        </text:list-item>
        <text:list-item>
          <text:p text:style-name="P7" loext:marker-style-name="T5">të përfshihet në punë ekipore dhe të organizojë atë;</text:p>
        </text:list-item>
        <text:list-item>
          <text:p text:style-name="P7" loext:marker-style-name="T5">të përshkruajë menaxhimin dhe kontrollimin e burimeve harduerike dhe softuerike nga ana e sistemit operativ;</text:p>
        </text:list-item>
        <text:list-item>
          <text:p text:style-name="P7" loext:marker-style-name="T5">të kërkojë dhe të analizojë programet softuerike;</text:p>
        </text:list-item>
        <text:list-item>
          <text:p text:style-name="P7" loext:marker-style-name="T5">të zgjidhë problemet themelore lidhur me sistemin operativ;</text:p>
        </text:list-item>
        <text:list-item>
          <text:p text:style-name="P7" loext:marker-style-name="T5">të respektojë shfrytëzimin e standardeve dhe të drejtat autoriale;</text:p>
        </text:list-item>
        <text:list-item>
          <text:p text:style-name="P7" loext:marker-style-name="T5">të zbatojë të drejtat morale dhe etike që lidhen me përdorimin e softuerëve;</text:p>
        </text:list-item>
        <text:list-item>
          <text:p text:style-name="P7" loext:marker-style-name="T5">të defragmentojë diskun.</text:p>
        </text:list-item>
        <text:list-item>
          <text:p text:style-name="P9"><text:span text:style-name="T2">Kapitulli 2</text:span><text:span text:style-name="T3">: Menaxhimi i procesorit dhe memories <text:s text:c="3"/></text:span><text:span text:style-name="T4">(20 orë)</text:span></text:p>
        </text:list-item>
        <text:list-item>
          <text:p text:style-name="P10"/>
        </text:list-item>
        <text:list-item>
          <text:p text:style-name="P9"><text:span text:style-name="T3">a) <text:s text:c="2"/>Qëllimet e kapitullit</text:span></text:p>
        </text:list-item>
        <text:list-item>
          <text:p text:style-name="P9"><text:span text:style-name="T4">Në përfundim të kapitullit, nxënësi duhet të:</text:span></text:p>
        </text:list-item>
        <text:list-item>
          <text:p text:style-name="P11" loext:marker-style-name="T5">të bëjë menaxhimin e pajisjeve kompjuterike;</text:p>
        </text:list-item>
        <text:list-item>
          <text:p text:style-name="P11" loext:marker-style-name="T5">te bëjë menaxhimin e fajlave (skedarëve);</text:p>
        </text:list-item>
        <text:list-item>
          <text:p text:style-name="P12" loext:marker-style-name="T5">të bëjë menaxhimin e memories dhe të procesorit.</text:p>
        </text:list-item>
      </text:list>
      <text:p text:style-name="P13">Temat e kapitulli:</text:p>
      <text:list text:style-name="WW8Num26">
        <text:list-header>
          <text:p text:style-name="P14" loext:marker-style-name="T4">Komprimimi (ngjeshja)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WW8Num1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0z0" style:family="text">
      <style:text-properties style:font-name="Times New Roman1" fo:font-family="'Times New Roman'" style:font-family-generic="roman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WW8Num9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Times New Roman1" fo:font-family="'Times New Roman'" style:font-family-generic="roman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7z0" style:family="text">
      <style:text-properties style:font-name="Times New Roman1" fo:font-family="'Times New Roman'" style:font-family-generic="roman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WW8Num1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Times New Roman1" fo:font-family="'Times New Roman'" style:font-family-generic="roman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Times New Roman1" fo:font-family="'Times New Roman'" style:font-family-generic="roman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41" text:consecutive-numbering="true">
      <text:list-level-style-bullet text:level="1" text:style-name="WW8Num141z0" loext:num-list-format="%1%." style:num-suffix="." text:bullet-char="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  <style:text-properties style:font-name="Symbol"/>
      </text:list-level-style-bullet>
      <text:list-level-style-bullet text:level="2" text:style-name="WW8Num141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4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41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4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41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4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0" text:consecutive-numbering="true">
      <text:list-level-style-bullet text:level="1" text:style-name="WW8Num90z0" loext:num-list-format="%1%." style:num-suffix="." text:bullet-char="–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  <style:text-properties style:font-name="Times New Roman1"/>
      </text:list-level-style-bullet>
      <text:list-level-style-bullet text:level="2" text:style-name="WW8Num90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9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0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0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9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0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0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9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–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  <style:text-properties style:font-name="Times New Roman1"/>
      </text:list-level-style-bullet>
      <text:list-level-style-bullet text:level="2" text:style-name="WW8Num22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2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2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7" text:consecutive-numbering="true">
      <text:list-level-style-bullet text:level="1" text:style-name="WW8Num177z0" loext:num-list-format="%1%." style:num-suffix="." text:bullet-char="–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  <style:text-properties style:font-name="Times New Roman1"/>
      </text:list-level-style-bullet>
      <text:list-level-style-bullet text:level="2" text:style-name="WW8Num177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7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77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7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77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7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–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  <style:text-properties style:font-name="Times New Roman1"/>
      </text:list-level-style-bullet>
      <text:list-level-style-bullet text:level="2" text:style-name="WW8Num20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0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0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0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0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loext:num-list-format="%1%." style:num-suffix="." text:bullet-char="–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  <style:text-properties style:font-name="Times New Roman1"/>
      </text:list-level-style-bullet>
      <text:list-level-style-bullet text:level="2" text:style-name="WW8Num26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6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6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6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6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2T02:20:25.416361860</meta:creation-date>
    <dc:date>2025-11-27T02:28:34.844766681</dc:date>
    <meta:editing-duration>PT1H27M6S</meta:editing-duration>
    <meta:editing-cycles>4</meta:editing-cycles>
    <meta:generator>LibreOffice/25.8.2.2$Linux_X86_64 LibreOffice_project/580$Build-2</meta:generator>
    <meta:document-statistic meta:table-count="0" meta:image-count="0" meta:object-count="0" meta:page-count="2" meta:paragraph-count="34" meta:word-count="269" meta:character-count="1694" meta:non-whitespace-character-count="1471"/>
  </office:meta>
</office:document-meta>
</file>