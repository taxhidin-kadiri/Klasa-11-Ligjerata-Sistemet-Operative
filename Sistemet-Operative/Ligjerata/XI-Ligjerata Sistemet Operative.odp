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0000002D00D80057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DejaVu Serif" svg:font-family="'DejaVu Serif'" style:font-family-generic="roman" style:font-pitch="variable"/>
    <style:font-face style:name="DejaVu Serif1" svg:font-family="'DejaVu Serif'"/>
    <style:font-face style:name="Liberation Mono" svg:font-family="'Liberation Mono', 'Courier New'"/>
    <style:font-face style:name="Liberation Sans" svg:font-family="'Liberation Sans'" style:font-family-generic="roman" style:font-pitch="variable"/>
    <style:font-face style:name="Liberation Serif" svg:font-family="'Liberation Serif', 'Times New 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Devanagari" svg:font-family="'Noto Sans Devanagari'" style:font-family-generic="system" style:font-pitch="variable"/>
    <style:font-face style:name="Noto Sans Mono CJK SC" svg:font-family="'Noto Sans Mono CJK SC'"/>
    <style:font-face style:name="Noto Sans1" svg:font-family="'Noto Sans'" style:font-family-generic="system" style:font-pitch="variable"/>
    <style:font-face style:name="Noto Serif CJK SC" svg:font-family="'Noto Serif CJK SC'"/>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Default_20_1-title">
      <style:graphic-properties draw:stroke="none" svg:stroke-width="0cm" draw:fill="none" loext:fill-use-slide-background="false" draw:textarea-horizontal-align="justify" draw:textarea-vertical-align="middle" draw:auto-grow-height="false" draw:fit-to-size="false" style:shrink-to-fit="false" fo:min-height="2.63cm" fo:padding-top="0cm" fo:padding-bottom="0cm" fo:padding-left="0cm" fo:padding-right="0cm" fo:wrap-option="wrap" loext:decorative="false"/>
      <style:paragraph-properties style:writing-mode="lr-tb"/>
    </style:style>
    <style:style style:name="pr2" style:family="presentation" style:parent-style-name="Default_20_1-outline1">
      <style:graphic-properties draw:stroke="none" svg:stroke-width="0cm" draw:fill="none" loext:fill-use-slide-background="false" draw:textarea-horizontal-align="justify" draw:textarea-vertical-align="top" draw:auto-grow-height="false" draw:fit-to-size="false" style:shrink-to-fit="true" fo:min-height="8.885cm" fo:padding-top="0cm" fo:padding-bottom="0cm" fo:padding-left="0cm" fo:padding-right="0cm" fo:wrap-option="wrap" loext:decorative="false"/>
      <style:paragraph-properties style:writing-mode="lr-tb"/>
    </style:style>
    <style:style style:name="pr3" style:family="presentation" style:parent-style-name="Default_20_1-notes">
      <style:graphic-properties draw:fill-color="#ffffff" fo:min-height="12.572cm" loext:decorative="false"/>
      <style:paragraph-properties style:writing-mode="lr-tb"/>
    </style:style>
    <style:style style:name="pr4" style:family="presentation" style:parent-style-name="Default-outline1">
      <style:graphic-properties draw:stroke="none" svg:stroke-width="0cm" draw:fill="none" loext:fill-use-slide-background="false" draw:textarea-horizontal-align="justify" draw:textarea-vertical-align="top" draw:auto-grow-height="false" draw:fit-to-size="false" style:shrink-to-fit="true" fo:min-height="8.885cm" fo:padding-top="0cm" fo:padding-bottom="0cm" fo:padding-left="0cm" fo:padding-right="0cm" fo:wrap-option="wrap" loext:decorative="false"/>
      <style:paragraph-properties style:writing-mode="lr-tb"/>
    </style:style>
    <style:style style:name="pr5" style:family="presentation" style:parent-style-name="Default-notes">
      <style:graphic-properties draw:fill-color="#ffffff" fo:min-height="12.572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1.2cm" fo:margin-right="0cm" fo:margin-top="0.42cm" fo:margin-bottom="0.35cm" fo:line-height="100%" fo:text-align="center" fo:text-indent="0cm" loext:tab-stop-distance="0cm">
        <style:tab-stops>
          <style:tab-stop style:position="0cm"/>
        </style:tab-stops>
      </style:paragraph-properties>
    </style:style>
    <style:style style:name="P4" style:family="paragraph">
      <style:paragraph-properties fo:margin-left="1.2cm" fo:margin-right="0cm" fo:margin-top="0.5cm" fo:margin-bottom="0cm" fo:line-height="100%" fo:text-align="start" fo:text-indent="0cm" loext:tab-stop-distance="0cm">
        <style:tab-stops>
          <style:tab-stop style:position="0cm"/>
        </style:tab-stops>
      </style:paragraph-properties>
    </style:style>
    <style:style style:name="P5" style:family="paragraph">
      <style:paragraph-properties fo:margin-left="1.2cm" fo:margin-right="0cm" fo:margin-top="0.42cm" fo:margin-bottom="0.35cm" fo:line-height="100%" fo:text-align="start" fo:text-indent="0cm" loext:tab-stop-distance="0cm">
        <style:tab-stops>
          <style:tab-stop style:position="0cm"/>
        </style:tab-stops>
      </style:paragraph-properties>
    </style:style>
    <style:style style:name="P6" style:family="paragraph">
      <loext:graphic-properties draw:fill="none"/>
      <style:paragraph-properties fo:text-align="start"/>
      <style:text-properties fo:font-size="18pt"/>
    </style:style>
    <style:style style:name="P7" style:family="paragraph">
      <loext:graphic-properties draw:fill-color="#ffffff"/>
    </style:style>
    <style:style style:name="P8"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9" style:family="paragraph">
      <style:paragraph-properties fo:margin-left="0cm" fo:margin-right="0cm" fo:margin-top="0.42cm" fo:margin-bottom="0.35cm" fo:line-height="100%" fo:text-align="start" fo:text-indent="0cm" loext:tab-stop-distance="0cm">
        <style:tab-stops>
          <style:tab-stop style:position="0cm"/>
        </style:tab-stops>
      </style:paragraph-properties>
    </style:style>
    <style:style style:name="P10" style:family="paragraph">
      <style:paragraph-properties fo:margin-left="0cm" fo:margin-right="0cm" fo:margin-top="0.42cm" fo:margin-bottom="0.35cm" fo:line-height="100%" fo:text-align="start" fo:text-indent="0cm"/>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5cm" fo:margin-bottom="0cm" fo:line-height="100%" fo:text-align="start" fo:text-indent="0cm"/>
    </style:style>
    <style:style style:name="P13" style:family="paragraph">
      <style:paragraph-properties fo:margin-left="1.251cm" fo:margin-right="0cm" fo:margin-top="0cm" fo:margin-bottom="0.436cm" fo:line-height="115%" fo:text-align="start" fo:text-indent="-0.499cm" loext:tab-stop-distance="0cm">
        <style:tab-stops>
          <style:tab-stop style:position="0cm"/>
        </style:tab-stops>
      </style:paragraph-properties>
    </style:style>
    <style:style style:name="P14" style:family="paragraph">
      <style:paragraph-properties fo:margin-left="1.2cm" fo:margin-right="0cm" fo:margin-top="0cm" fo:margin-bottom="0cm" fo:line-height="100%" fo:text-align="center" fo:text-indent="0cm" loext:tab-stop-distance="0cm">
        <style:tab-stops>
          <style:tab-stop style:position="0cm"/>
        </style:tab-stops>
      </style:paragraph-properties>
    </style:style>
    <style:style style:name="P15" style:family="paragraph">
      <style:paragraph-properties fo:margin-left="0cm" fo:margin-right="0cm" fo:margin-top="0.5cm" fo:margin-bottom="0cm" fo:line-height="100%" fo:text-align="start" fo:text-indent="0cm"/>
      <style:text-properties style:font-name="DejaVu Serif" fo:font-size="32pt" style:font-size-asian="32pt" style:font-size-complex="32pt"/>
    </style:style>
    <style:style style:name="P16" style:family="paragraph">
      <loext:graphic-properties draw:fill="none"/>
      <style:paragraph-properties fo:text-align="start" style:font-independent-line-spacing="true"/>
      <style:text-properties style:font-name="DejaVu Serif" fo:font-size="32pt" style:font-size-asian="32pt" style:font-size-complex="32pt"/>
    </style:style>
    <style:style style:name="P17" style:family="paragraph">
      <style:paragraph-properties fo:margin-left="2.501cm" fo:margin-right="0cm" fo:margin-top="0cm" fo:margin-bottom="0cm" fo:line-height="100%" fo:text-align="center" fo:text-indent="0cm" loext:tab-stop-distance="0cm">
        <style:tab-stops>
          <style:tab-stop style:position="0cm"/>
        </style:tab-stops>
      </style:paragraph-properties>
    </style:style>
    <style:style style:name="P18" style:family="paragraph">
      <style:paragraph-properties fo:margin-left="0cm" fo:margin-right="0cm" fo:margin-top="0.42cm" fo:margin-bottom="0.35cm" fo:line-height="100%" fo:text-align="start" fo:text-indent="0cm"/>
      <style:text-properties fo:font-size="10pt" style:font-size-asian="10pt" style:font-size-complex="10pt"/>
    </style:style>
    <style:style style:name="P19" style:family="paragraph">
      <style:paragraph-properties fo:margin-left="0cm" fo:margin-right="0cm" fo:margin-top="0cm" fo:margin-bottom="0.436cm" fo:line-height="115%" fo:text-align="start" fo:text-indent="0cm" loext:tab-stop-distance="0cm">
        <style:tab-stops>
          <style:tab-stop style:position="1.251cm"/>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Arial"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Noto Sans CJK SC1"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Noto Sans CJK S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name-asian="Noto Sans CJK SC1"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Noto Sans CJK SC1" style:font-size-asian="32pt" style:font-style-asian="normal" style:font-weight-asian="normal" style:font-size-complex="32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Arial"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Times New Roman"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Liberation Serif" fo:font-size="40pt" fo:letter-spacing="normal" fo:language="en" fo:country="US" fo:font-style="normal" style:text-underline-style="none" fo:font-weight="bold" fo:background-color="transparent" style:font-name-asian="Noto Serif CJK SC" style:font-size-asian="40pt" style:font-style-asian="normal" style:font-weight-asian="bold" style:font-size-complex="40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DejaVu Serif"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DejaVu Serif"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DejaVu Serif" fo:font-size="32pt" fo:letter-spacing="normal" fo:language="en" fo:country="US" fo:font-style="normal" style:text-underline-style="none" fo:font-weight="normal" fo:background-color="transparent" style:font-name-asian="Noto Sans Mono CJK SC" style:font-size-asian="32pt" style:font-style-asian="normal" style:font-weight-asian="normal" style:font-size-complex="32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DejaVu Serif" fo:font-size="32pt" fo:letter-spacing="normal" fo:language="en" fo:country="US" fo:font-style="normal" style:text-underline-style="none" fo:font-weight="bold" fo:background-color="transparent" style:font-name-asian="Noto Sans Mono CJK SC" style:font-size-asian="32pt" style:font-style-asian="normal" style:font-weight-asian="bold" style:font-size-complex="32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Liberation Serif" fo:font-size="36pt" fo:letter-spacing="normal" fo:language="en" fo:country="US" fo:font-style="normal" style:text-underline-style="none" fo:font-weight="bold" fo:background-color="transparent" style:font-name-asian="Noto Serif CJK SC" style:font-size-asian="36pt" style:font-style-asian="normal" style:font-weight-asian="bold" style:font-size-complex="36pt" style:font-style-complex="normal" style:font-weight-complex="bold"/>
    </style:style>
    <style:style style:name="T27" style:family="text">
      <style:text-properties fo:font-variant="normal" fo:text-transform="none" fo:color="#000000" loext:opacity="100%" style:text-outline="false" style:text-line-through-style="none" style:text-line-through-type="none" style:text-position="0% 100%" style:font-name="DejaVu Serif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DejaVu Serif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DejaVu Serif1" fo:font-size="28pt" fo:letter-spacing="normal" fo:language="en" fo:country="US" fo:font-style="normal" style:text-underline-style="none" fo:font-weight="normal" fo:background-color="transparent" style:font-name-asian="Noto Sans Mono CJK SC" style:font-size-asian="28pt" style:font-style-asian="normal" style:font-weight-asian="normal" style:font-size-complex="28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31"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DejaVu Serif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DejaVu Serif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34" style:family="text">
      <style:text-properties fo:font-variant="normal" fo:text-transform="none" fo:color="#000000" loext:opacity="100%" style:text-outline="false" style:text-line-through-style="none" style:text-line-through-type="none" style:text-position="0% 100%" style:font-name="DejaVu Serif1" fo:font-size="32pt" fo:letter-spacing="normal" fo:language="en" fo:country="US" fo:font-style="normal" style:text-underline-style="none" fo:font-weight="normal" fo:background-color="transparent" style:font-name-asian="Noto Sans Mono CJK SC"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DejaVu Serif1" fo:font-size="24pt" fo:letter-spacing="normal" fo:language="en" fo:country="US" fo:font-style="normal" style:text-underline-style="none" fo:font-weight="bold" fo:background-color="transparent" style:font-name-asian="Noto Sans Mono CJK SC" style:font-size-asian="24pt" style:font-style-asian="normal" style:font-weight-asian="bold" style:font-size-complex="24pt" style:font-style-complex="normal" style:font-weight-complex="bold"/>
    </style:style>
    <style:style style:name="T36" style:family="text">
      <style:text-properties fo:font-variant="normal" fo:text-transform="none" fo:color="#000000" loext:opacity="100%" style:text-outline="false" style:text-line-through-style="none" style:text-line-through-type="none" style:text-position="0% 100%" style:font-name="DejaVu Serif1" fo:font-size="24pt" fo:letter-spacing="normal" fo:language="en" fo:country="US" fo:font-style="normal" style:text-underline-style="none" fo:font-weight="normal" fo:background-color="transparent" style:font-name-asian="Noto Sans Mono CJK SC"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752cm" text:min-label-width="0.49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Sistemet Operative" draw:style-name="dp1" draw:master-page-name="Default_20_1" presentation:presentation-page-layout-name="AL1T1">
        <draw:frame draw:name="PlaceHolder 1" presentation:style-name="pr1" draw:text-style-name="P2" draw:layer="layout" svg:width="25.198cm" svg:height="2.628cm" svg:x="1.4cm" svg:y="0.628cm" presentation:class="title" presentation:user-transformed="true">
          <draw:text-box>
            <text:p text:style-name="P1"><text:span text:style-name="T1">Sistemet Operative</text:span></text:p>
          </draw:text-box>
        </draw:frame>
        <draw:frame draw:name="PlaceHolder 2" presentation:style-name="pr2" draw:text-style-name="P2" draw:layer="layout" svg:width="25.198cm" svg:height="11.429cm" svg:x="1.27cm" svg:y="3.175cm" presentation:class="outline" presentation:user-transformed="true">
          <draw:text-box>
            <text:p text:style-name="P3"><text:span text:style-name="T2">Sistemi Operativ dhe Ndarja e tij</text:span></text:p>
            <text:p text:style-name="P4"><text:span text:style-name="T3"/></text:p>
            <text:p text:style-name="P4"><text:span text:style-name="T3"/></text:p>
            <text:p text:style-name="P4"><text:span text:style-name="T3"/></text:p>
            <text:p text:style-name="P4"><text:span text:style-name="T3"/></text:p>
            <text:p text:style-name="P5"><text:span text:style-name="T4"><text:s text:c="101"/></text:span></text:p>
            <text:p text:style-name="P5"><text:span text:style-name="T5">29.09.2025 <text:s text:c="51"/>Prof. B.Sc Taxhidin Kadiri​</text:span></text:p>
            <text:p text:style-name="P4"><text:span text:style-name="T6"/></text:p>
            <text:p text:style-name="P4"><text:span text:style-name="T7"/></text:p>
            <text:p text:style-name="P4"><text:span text:style-name="T7"/></text:p>
          </draw:text-box>
        </draw:frame>
        <draw:frame draw:style-name="gr1" draw:text-style-name="P6" draw:layer="layout" svg:width="9.205cm" svg:height="6.904cm" svg:x="9.209cm" svg:y="4.525cm">
          <draw:image xlink:href="Pictures/10000000000003C0000002D00D800575.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1. Sistemi Operativ dhe Ndarja e tij" draw:style-name="dp1" draw:master-page-name="Default_20_1" presentation:presentation-page-layout-name="AL1T1">
        <draw:frame draw:name="PlaceHolder 1" presentation:style-name="pr1" draw:text-style-name="P2" draw:layer="layout" svg:width="25.198cm" svg:height="2.628cm" svg:x="1.4cm" svg:y="0.628cm" presentation:class="title" presentation:user-transformed="true">
          <draw:text-box>
            <text:p text:style-name="P8"><text:span text:style-name="T8">1. Sistemi Operativ dhe Ndarja e tij</text:span></text:p>
          </draw:text-box>
        </draw:frame>
        <draw:frame draw:name="PlaceHolder 2" presentation:style-name="pr2" draw:text-style-name="P2" draw:layer="layout" svg:width="25.198cm" svg:height="12.699cm" svg:x="1.4cm" svg:y="2.54cm" presentation:class="outline" presentation:user-transformed="true">
          <draw:text-box>
            <text:p text:style-name="P3"><text:span text:style-name="T9"><text:s/></text:span></text:p>
            <text:p text:style-name="P5"><text:span text:style-name="T9">Sistemi operativ (SO)</text:span><text:span text:style-name="T10"> është softueri qendror që kontrollon dhe </text:span><text:span text:style-name="T10">menaxhon burimet themelore të kompjuterit (CPU, memorie, </text:span><text:span text:style-name="T10">pajisje hyrëse-dalëse). Ai ofron një ndërfaqe ndërmjet harduerit </text:span><text:span text:style-name="T10">dhe programeve të tjera, duke u mundësuar atyre akses eficient </text:span><text:span text:style-name="T10">në këto burime. SO ekzekuton ciklet hyrëse–përpunim–dalje </text:span><text:span text:style-name="T10">për të procesuar të dhënat, dhe kujdeset për funksionet bazë si </text:span><text:span text:style-name="T10">caktimi i memories dhe planifikimi i proceseve.</text:span></text:p>
            <text:list text:style-name="L4">
              <text:list-item>
                <text:p text:style-name="P9"><text:span text:style-name="T9">Funksionet kryesore të SO-së:</text:span><text:span text:style-name="T10"> menaxhimi i memories (ndarja </text:span><text:span text:style-name="T10">dhe rindarja e saj midis programeve), caktimi i CPU-së te </text:span><text:span text:style-name="T10">proceset aktive (planifikimi i proceseve dhe ndarja e CPU-së), </text:span><text:span text:style-name="T10">kontrolli i pajisjeve hyrëse/dalëse (komunikimi me harduerin </text:span><text:span text:style-name="T10">hyrje-dalës), menaxhimi i sistemit të skedarëve (krijimi, leximi </text:span><text:span text:style-name="T10">dhe fshirja e fajllave) dhe ofrimi i shërbimeve rrjetës (komunikim </text:span><text:span text:style-name="T10">ndërmjet kompjuterëve).</text:span></text:p>
              </text:list-item>
            </text:list>
            <text:p text:style-name="P5"><text:span text:style-name="T11"/></text:p>
            <text:p text:style-name="P5"><text:span text:style-name="T11"/></text:p>
          </draw:text-box>
        </draw:frame>
        <presentation:notes draw:style-name="dp2">
          <draw:page-thumbnail draw:style-name="gr2" draw:layer="layout" svg:width="18.623cm" svg:height="10.476cm" svg:x="1.483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1T1">
        <draw:frame draw:name="PlaceHolder 1" presentation:style-name="pr2" draw:text-style-name="P11" draw:layer="layout" svg:width="25.198cm" svg:height="14.604cm" svg:x="1.4cm" svg:y="0.635cm" presentation:class="outline" presentation:user-transformed="true">
          <draw:text-box>
            <text:list text:style-name="L4">
              <text:list-item>
                <text:p text:style-name="P10"><text:span text:style-name="T12">Komponentët e SO-së:</text:span><text:span text:style-name="T13"> në qendër është kernel-i, që komunikon direkt me harduerin dhe menaxhon burimet. Përveç kernel-it, shell-i (interpretor komandash) siguron ndërfaqen me përdoruesin ose aplikacionet (p.sh. linja e komandave apo ndërfaqja grafike). Ekzistojnë edhe shtresa ndihmëse softuerike (sistemi i skedarëve, biblioteka sistemore) që mbështesin funksionimin e OS-së.</text:span></text:p>
              </text:list-item>
              <text:list-item>
                <text:p text:style-name="P10"><text:span text:style-name="T12">Llojet e sistemeve operative:</text:span><text:span text:style-name="T13"> SO-të mund të jenë të hapura (open source), ku kodi burimor është i disponueshëm (p.sh. Linux, BSD) ose të mbyllura (komerciale), pronë e kompanive me kod të mbyllur (p.sh. Windows, macOS).</text:span></text:p>
              </text:list-item>
            </text:list>
            <text:p text:style-name="P5"><text:span text:style-name="T11"/></text:p>
          </draw:text-box>
        </draw:frame>
        <presentation:notes draw:style-name="dp2">
          <draw:page-thumbnail draw:style-name="gr2" draw:layer="layout" svg:width="18.623cm" svg:height="10.476cm" svg:x="1.483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_20_1" presentation:presentation-page-layout-name="AL1T1">
        <draw:frame draw:name="PlaceHolder 1" presentation:style-name="pr2" draw:text-style-name="P11" draw:layer="layout" svg:width="25.198cm" svg:height="13.334cm" svg:x="1.4cm" svg:y="1.27cm" presentation:class="outline" presentation:user-transformed="true">
          <draw:text-box>
            <text:list text:style-name="L4">
              <text:list-item>
                <text:p text:style-name="P10"><text:span text:style-name="T8">Përdorim personal:</text:span><text:span text:style-name="T2"> SO për kompjuterë personalë (desktop/laptop) – p.sh. Windows 10/11, macOS, Linux (Ubuntu, Fedora) – janë optimizuar për ndërfaqe përdoruesi të pasura dhe aplikacione të shumëllojshme.</text:span></text:p>
              </text:list-item>
              <text:list-item>
                <text:p text:style-name="P10"><text:span text:style-name="T8">Përdorim server/rrjet: </text:span><text:span text:style-name="T2">SO për serverë – p.sh. Windows Server, Linux Server – ofrojnë burime të përbashkëta në rrjet (shpërndarje skedarësh, databaza, web shërbime) dhe mundësojnë shërbim për shumë përdorues njëkohësisht.</text:span></text:p>
              </text:list-item>
              <text:list-item>
                <text:p text:style-name="P10"><text:span text:style-name="T8">Mainframe/Superkompjuterë:</text:span><text:span text:style-name="T2"> Në mjedise të mëdha (institucione financiare, kërkime shkencore) përdoren OS të fuqishëm për llogaritje intensive dhe menaxhim të të dhënave masive (p.sh. IBM z/OS).</text:span></text:p>
              </text:list-item>
            </text:list>
            <text:p text:style-name="P5"><text:span text:style-name="T11"/></text:p>
          </draw:text-box>
        </draw:frame>
        <presentation:notes draw:style-name="dp2">
          <draw:page-thumbnail draw:style-name="gr2" draw:layer="layout" svg:width="18.623cm" svg:height="10.476cm" svg:x="1.483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1T1">
        <draw:frame draw:name="PlaceHolder 1" presentation:style-name="pr2" draw:text-style-name="P11" draw:layer="layout" svg:width="25.198cm" svg:height="13.969cm" svg:x="1.4cm" svg:y="0.635cm" presentation:class="outline" presentation:user-transformed="true">
          <draw:text-box>
            <text:list text:style-name="L4">
              <text:list-item>
                <text:p text:style-name="P10"><text:span text:style-name="T8">Real-Time (në kohë reale): </text:span><text:span text:style-name="T2">Sistemet operative që reagojnë menjëherë brenda një kohe të caktuar (p.sh. VxWorks në aviacion, QNX në automjete), ku vonesa e sistemit duhet të jetë minimale.</text:span></text:p>
              </text:list-item>
              <text:list-item>
                <text:p text:style-name="P10"><text:span text:style-name="T8">Të ngulitura/mobile: </text:span><text:span text:style-name="T2">OS në pajisje elektronike dhe mobile (p.sh. Android në smartfonë/tableta, firmware në televizione dhe automjete industriale). Këto sisteme shpesh kanë kërkesa specifike (kufizime burimesh, funksione të dedikuara).</text:span></text:p>
              </text:list-item>
              <text:list-item>
                <text:p text:style-name="P10"><text:span text:style-name="T8">Shembuj praktikë:</text:span><text:span text:style-name="T2"> Sistemet operativ më të zakonshme sot janë Windows (Microsoft), Linux (p.sh. Ubuntu, Fedora) dhe macOS (Apple). Kur hapni një aplikacion, OS vendos programin në memorie dhe koordinon punën e tij në CPU dhe pajisjet I/O (p.sh. lexon/skanon skedarët e nevojshëm, shfaq dritën ose tingullin e duhur në pajisje).</text:span></text:p>
              </text:list-item>
              <text:list-item>
                <text:p text:style-name="P10"><text:span text:style-name="T8">Ushtrim:</text:span><text:span text:style-name="T2"> Verifikoni në sistemin tuaj emrin dhe versionin e OS-së: në Windows shikoni “Rreth” (About) në Settings; në Linux përdorni komandën uname -a ose lsb_release -a. Më pas, hapni një mjet si Task Manager (Windows) ose htop (Linux) dhe vëzhgoni listën e proceseve dhe përdorimin e CPU/RAM-it nga sistemi operativ.</text:span></text:p>
              </text:list-item>
            </text:list>
            <text:p text:style-name="P5"><text:span text:style-name="T11"/></text:p>
            <text:p text:style-name="P5"><text:span text:style-name="T11"/></text:p>
          </draw:text-box>
        </draw:frame>
        <presentation:notes draw:style-name="dp2">
          <draw:page-thumbnail draw:style-name="gr2" draw:layer="layout" svg:width="18.623cm" svg:height="10.476cm" svg:x="1.483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2. Ndërfaqja e Përdoruesit" draw:style-name="dp1" draw:master-page-name="Default_20_1" presentation:presentation-page-layout-name="AL1T1">
        <draw:frame draw:name="PlaceHolder 1" presentation:style-name="pr2" draw:text-style-name="P11" draw:layer="layout" svg:width="25.198cm" svg:height="9.133cm" svg:x="1.4cm" svg:y="3.685cm" presentation:class="outline" presentation:user-transformed="true">
          <draw:text-box>
            <text:p text:style-name="P5"><text:span text:style-name="T8">Ndërfaqja e përdoruesit</text:span><text:span text:style-name="T2"> është komponenti që mundëson ndërveprimin midis njeriut dhe sistemit kompjuterik. Ajo përfshin mënyra të ndryshme hyrëse (tastierë, maus, ekran prekës) dhe mënyra dalëse (ekran, grafik, terminal teksti). Një ndërfaqe e qartë ndihmon përdoruesin të kryejë detyra shpejt dhe korrekt. Për këtë, sistemi operativ përdor shell-in (interpreton komandat në terminal) dhe mjedise grafike (desktop) për ta lehtësuar përdorimin.</text:span></text:p>
            <text:list text:style-name="L4">
              <text:list-item>
                <text:p text:style-name="P9"><text:span text:style-name="T8">Elementet e ndërfaqes: </text:span><text:span text:style-name="T2">Përfshihen ikonat, dritaret (windows), meny-t dhe butonat në mjediset grafike. Në linjën e komandave (CLI) elementet e ndërfaqes janë prompt-i i tekstit dhe komandat që shkruhen.</text:span></text:p>
              </text:list-item>
            </text:list>
          </draw:text-box>
        </draw:frame>
        <draw:frame draw:name="PlaceHolder 2" presentation:style-name="pr1" draw:text-style-name="P2" draw:layer="layout" svg:width="25.198cm" svg:height="2.628cm" svg:x="1.4cm" svg:y="0.628cm" presentation:class="title" presentation:user-transformed="true">
          <draw:text-box>
            <text:p text:style-name="P8"><text:span text:style-name="T14">2. Ndërfaqja e Përdoruesit</text:span></text:p>
          </draw:text-box>
        </draw:frame>
        <presentation:notes draw:style-name="dp2">
          <draw:page-thumbnail draw:style-name="gr2" draw:layer="layout" svg:width="18.623cm" svg:height="10.476cm" svg:x="1.483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_20_1" presentation:presentation-page-layout-name="AL1T1">
        <draw:frame draw:name="PlaceHolder 1" presentation:style-name="pr2" draw:text-style-name="P11" draw:layer="layout" svg:width="25.198cm" svg:height="13.334cm" svg:x="1.4cm" svg:y="1.27cm" presentation:class="outline" presentation:user-transformed="true">
          <draw:text-box>
            <text:p text:style-name="P5"><text:span text:style-name="T11"><text:s text:c="3"/></text:span></text:p>
            <text:list text:style-name="L4">
              <text:list-item>
                <text:p text:style-name="P9"><text:span text:style-name="T15">Roli i shell-it:</text:span><text:span text:style-name="T3"> Shell-i (p.sh. Command Prompt në Windows apo Terminal në Linux) pranon komandat nga përdoruesi dhe i interpreton në nivel sistemi. Për shembull, komanda ls në Linux ose dir në Windows tregon përmbajtjen e një dosjeje.</text:span></text:p>
              </text:list-item>
              <text:list-item>
                <text:p text:style-name="P9"><text:span text:style-name="T15">Ndërfaqet grafike:</text:span><text:span text:style-name="T3"> Desktop-et grafike përdorin tastierën dhe maus-in për të naviguar(drejtuar). Për shembull, në Windows përdoruesi klikon ikonat për të hapur programe, ndërsa në Linux klikohet në menynë e aplikacioneve ose ikona e programit. GUI-ja është më lehtë për përdoruesit e zakonshëm dhe nuk kërkon njohuri specifike komandeve.</text:span></text:p>
              </text:list-item>
              <text:list-item>
                <text:p text:style-name="P9"><text:span text:style-name="T15">Ushtrim:</text:span><text:span text:style-name="T3"> Hyni në ndërfaqen komandash (p.sh. Terminal në Linux ose Command Prompt në Windows) dhe shkruani mkdir Prova për të krijuar një dosje të re. Më pas, hapni menaxherin e skedarëve në mjedisin grafik dhe verifikoni se ekziston dosja "Prova" në direktoriumin aktual.</text:span></text:p>
              </text:list-item>
            </text:list>
            <text:p text:style-name="P5"><text:span text:style-name="T11"/></text:p>
          </draw:text-box>
        </draw:frame>
        <presentation:notes draw:style-name="dp2">
          <draw:page-thumbnail draw:style-name="gr2" draw:layer="layout" svg:width="18.623cm" svg:height="10.476cm" svg:x="1.483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Arkitektura e Kompjuterit dhe BIOS-i" draw:style-name="dp1" draw:master-page-name="Default_20_1" presentation:presentation-page-layout-name="AL1T1">
        <draw:frame draw:name="PlaceHolder 1" presentation:style-name="pr2" draw:text-style-name="P11" draw:layer="layout" svg:width="25.198cm" svg:height="11.554cm" svg:x="1.4cm" svg:y="3.685cm" presentation:class="outline" presentation:user-transformed="true">
          <draw:text-box>
            <text:list text:style-name="L4">
              <text:list-item>
                <text:p text:style-name="P12"><text:span text:style-name="T10">Arkitektura e kompjuterit studion komponentët bazë dhe mënyrën si ata bashkëveprojnë. Sipas modelit Von Neumann, </text:span><text:span text:style-name="T9">CPU</text:span><text:span text:style-name="T10"> (njësia qendrore e përpunimit) merr instruksionet dhe të dhënat nga memoria dhe i përpunon ato. CPU-ja përbëhet nga ALU (njësia aritmetike-logjike) dhe njësia e kontrollit. Memoria kryesore (RAM) ruan programet dhe të dhënat gjatë ekzekutimit (përkohshme), ndërsa </text:span><text:span text:style-name="T9">memoria e përhershme</text:span><text:span text:style-name="T10"> (HDD/SSD) ruan të dhëna në mënyrë permanente edhe kur kompjuteri fiket. Të gjithë këta komponentë (CPU, memoria, pajisjet I/O) lidhen me njëri-tjetrin në motherboard përmes </text:span><text:span text:style-name="T9">bus</text:span><text:span text:style-name="T10">-eve (kanalet lidhëse të të dhënave) që mundësojnë transmetimin e informacionit.</text:span></text:p>
              </text:list-item>
            </text:list>
            <text:p text:style-name="P4"><text:span text:style-name="T16"/></text:p>
            <text:p text:style-name="P13"><text:span text:style-name="T17"/></text:p>
          </draw:text-box>
        </draw:frame>
        <draw:frame draw:name="PlaceHolder 2" presentation:style-name="pr1" draw:text-style-name="P2" draw:layer="layout" svg:width="25.198cm" svg:height="2.628cm" svg:x="1.4cm" svg:y="0.628cm" presentation:class="title" presentation:user-transformed="true">
          <draw:text-box>
            <text:p text:style-name="P14"><text:span text:style-name="T18">Arkitektura e Kompjuterit dhe BIOS-i</text:span></text:p>
          </draw:text-box>
        </draw:frame>
        <presentation:notes draw:style-name="dp2">
          <draw:page-thumbnail draw:style-name="gr2" draw:layer="layout" svg:width="18.623cm" svg:height="10.476cm" svg:x="1.483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Default">
        <draw:frame draw:name="PlaceHolder 1" presentation:style-name="pr4" draw:text-style-name="P11" draw:layer="layout" svg:width="25.198cm" svg:height="13.334cm" svg:x="1.4cm" svg:y="1.27cm" presentation:class="outline" presentation:user-transformed="true">
          <draw:text-box>
            <text:list text:style-name="L4">
              <text:list-item>
                <text:p text:style-name="P12"><text:span text:style-name="T2"><text:s text:c="3"/></text:span><text:span text:style-name="T8">Komponentët kryesorë:</text:span><text:span text:style-name="T2"> Njësia Qendrore e Përpunimit (CPU) përpunon instruksionet; Memoria Kryesore (RAM) ruan të dhënat gjatë ekzekutimit; Memorie e Përhershme (HDD/SSD) ruan informacione në mënyrë permanente; pajisjet hyrëse-dalëse (tastierë, maus, monitor, printer etj.) marrin/dërgojnë të dhëna në sistem. Të gjithë këta komunikojnë me njëri-tjetrin përmes </text:span><text:span text:style-name="T8">bus</text:span><text:span text:style-name="T2">-eve në motherboard.</text:span></text:p>
              </text:list-item>
              <text:list-item>
                <text:p text:style-name="P12"><text:span text:style-name="T8">CMOS/ROM:</text:span><text:span text:style-name="T2"> Një pjesë e kujtesës së pandryshueshme (ROM/flash) ruan firmware-in bazë të kompjuterit, përfshirë kodin e nisjes (BIOS).</text:span></text:p>
              </text:list-item>
            </text:list>
          </draw:text-box>
        </draw:frame>
        <presentation:notes draw:style-name="dp2">
          <draw:page-thumbnail draw:style-name="gr2" draw:layer="layout" svg:width="18.623cm" svg:height="10.476cm" svg:x="1.483cm" svg:y="2.123cm" draw:page-number="9" presentation:class="page"/>
          <draw:frame presentation:style-name="pr5" draw:text-style-name="P7" draw:layer="layout" svg:width="17.271cm" svg:height="12.572cm" svg:x="2.159cm" svg:y="13.271cm" presentation:class="notes" presentation:placeholder="true">
            <draw:text-box/>
          </draw:frame>
        </presentation:notes>
      </draw:page>
      <draw:page draw:name="page10" draw:style-name="dp1" draw:master-page-name="Default_20_1" presentation:presentation-page-layout-name="AL1T1">
        <draw:frame draw:name="PlaceHolder 1" presentation:style-name="pr2" draw:text-style-name="P11" draw:layer="layout" svg:width="25.198cm" svg:height="13.969cm" svg:x="1.4cm" svg:y="1.27cm" presentation:class="outline" presentation:user-transformed="true">
          <draw:text-box>
            <text:p text:style-name="P13"><text:span text:style-name="T19">BIOS (Basic Input/Output System):</text:span><text:span text:style-name="T20"> Firmware në ROM/flash që ekzekutohet sapo ndizet kompjuteri. BIOS-i kryen </text:span><text:span text:style-name="T21">Power-On Self-Test (POST)</text:span><text:span text:style-name="T20"> për të kontrolluar komponentët kryesorë (procesorin, memorien, grafiken) dhe më pas përcakton rendin e boot-it (nga disku, USB, etj.) për të ngarkuar sistemin operativ. Përdoruesi mund të hyjë në menynë e BIOS-it (p.sh. me F2/Del) për të ndryshuar parametrat themelorë (data/ora, fjalëkalimi, renditja e boot-it).</text:span></text:p>
            <text:p text:style-name="P13"><text:span text:style-name="T19">UEFI:</text:span><text:span text:style-name="T20"> Standard modern i firmware-it që zëvendëson BIOS-in në shumicën e kompjuterëve të rinj. UEFI ofron mbështetje për disqe më të mëdha (&gt;2TB), mundësi grafike në menunë e konfigurimit dhe mekanizma sigurie si Secure Boot.</text:span></text:p>
          </draw:text-box>
        </draw:frame>
        <presentation:notes draw:style-name="dp2">
          <draw:page-thumbnail draw:style-name="gr2" draw:layer="layout" svg:width="18.624cm" svg:height="10.476cm" svg:x="1.482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draw:frame draw:name="PlaceHolder 1" presentation:style-name="pr2" draw:text-style-name="P16" draw:layer="layout" svg:width="25.198cm" svg:height="13.969cm" svg:x="1.471cm" svg:y="1.27cm" presentation:class="outline" presentation:user-transformed="true">
          <draw:text-box>
            <text:list text:style-name="L4">
              <text:list-item>
                <text:p text:style-name="P15"><text:span text:style-name="T22"><text:s text:c="2"/></text:span><text:span text:style-name="T23">Shembull praktik:</text:span><text:span text:style-name="T22"> Rinisni(restartoni) kompjuterin dhe gjatë fillimit shtypni </text:span><text:span text:style-name="T24">F2 ose Del për të hapur menynë e BIOS/UEFI. Shikoni versionin e firmware-it dhe renditjen e pajisjeve në listën e boot-it.</text:span></text:p>
              </text:list-item>
              <text:list-item>
                <text:p text:style-name="P15"><text:span text:style-name="T25">Ushtrim:</text:span><text:span text:style-name="T24"> Identifikoni konfigurimin e arkitekturës së kompjuterit tuaj: në Windows hapni </text:span><text:span text:style-name="T25">“System Information”</text:span><text:span text:style-name="T24"> për të parë modelin e procesorit dhe sasinë e RAM-it; në Linux ekzekutoni lscpu dhe free -h. Më pas përshkruani shkurt procesin se si BIOS/UEFI nis sistemin operativ pas ndezjes.</text:span></text:p>
              </text:list-item>
            </text:list>
          </draw:text-box>
        </draw:frame>
        <presentation:notes draw:style-name="dp2">
          <draw:page-thumbnail draw:style-name="gr2" draw:layer="layout" svg:width="18.623cm" svg:height="10.476cm" svg:x="1.483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Llojet e Ndërfaqeve të Përdoruesit (GUI, Komandë)" draw:style-name="dp1" draw:master-page-name="Default_20_1" presentation:presentation-page-layout-name="AL1T1">
        <draw:frame draw:name="PlaceHolder 1" presentation:style-name="pr1" draw:text-style-name="P2" draw:layer="layout" svg:width="25.198cm" svg:height="2.81cm" svg:x="1.4cm" svg:y="0.537cm" presentation:class="title" presentation:user-transformed="true">
          <draw:text-box>
            <text:p text:style-name="P17"><text:span text:style-name="T26">Llojet e Ndërfaqeve të Përdoruesit (GUI, Komandë)</text:span></text:p>
          </draw:text-box>
        </draw:frame>
        <draw:frame draw:name="PlaceHolder 2" presentation:style-name="pr2" draw:text-style-name="P11" draw:layer="layout" svg:width="25.198cm" svg:height="11.554cm" svg:x="1.4cm" svg:y="3.685cm" presentation:class="outline" presentation:user-transformed="true">
          <draw:text-box>
            <text:list text:style-name="L7">
              <text:list-item>
                <text:p text:style-name="P12"><text:span text:style-name="T27">Sistemet operative ofrojnë dy ndërfaqe kryesore për ndërveprim: </text:span><text:span text:style-name="T28">Linja e komandës (CLI)</text:span><text:span text:style-name="T27"> dhe </text:span><text:span text:style-name="T28">Ndërfaqja grafike (GUI)</text:span><text:span text:style-name="T27">. Në CLI përdoruesi shkruan komanda tekstuale në një terminal; në GUI ai përdor ikonat dhe dritaret për të kontrolluar programet.</text:span></text:p>
              </text:list-item>
              <text:list-item>
                <text:p text:style-name="P12"><text:span text:style-name="T28">Komandë (CLI):</text:span><text:span text:style-name="T27"> Përdoruesi shkruan komandat në formë teksti (p.sh. </text:span><text:span text:style-name="T29">dir, ls, ping). Një shell (si Bash në Linux apo Command Prompt/PowerShell në Windows) ekzekuton këto komanda. CLI është shumë i fuqishëm për detyra komplekse dhe automatizime (p.sh. skriptim), por kërkon njohuri të komandave dhe sintaksës.</text:span></text:p>
              </text:list-item>
            </text:list>
          </draw:text-box>
        </draw:frame>
        <presentation:notes draw:style-name="dp2">
          <draw:page-thumbnail draw:style-name="gr2" draw:layer="layout" svg:width="18.623cm" svg:height="10.476cm" svg:x="1.483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_20_1" presentation:presentation-page-layout-name="AL1T1">
        <draw:frame draw:name="PlaceHolder 1" presentation:style-name="pr2" draw:text-style-name="P11" draw:layer="layout" svg:width="25.198cm" svg:height="13.969cm" svg:x="1.4cm" svg:y="1.27cm" presentation:class="outline" presentation:user-transformed="true">
          <draw:text-box>
            <text:list text:style-name="L7">
              <text:list-item>
                <text:p text:style-name="P18"><text:span text:style-name="T3"><text:s text:c="3"/></text:span><text:span text:style-name="T15">Grafik (GUI):</text:span><text:span text:style-name="T3"> Përfshin dritare, menu dhe ikona që kontrollohen me maus ose ekran me prekje (screentouch). Për shembull, në Windows klikimi mbi ikonën "This PC" hap një dritare me disqet e kompjuterit; në macOS klikohet në Dock-in e aplikacioneve. GUI-ja është më lehtë për përdoruesit e zakonshëm dhe nuk kërkon mësim komandash specifike.</text:span></text:p>
              </text:list-item>
            </text:list>
            <text:list text:style-name="L8">
              <text:list-item>
                <text:p text:style-name="P19"><text:span text:style-name="T30">Përparësitë:</text:span><text:span text:style-name="T31"> GUI-ja është më e lehtë për t’u mësuar dhe përdorur (ikonat dhe dritaret e bëjnë të gjitha vizuale). CLI-ja ofron kontroll të plotë dhe mundësi skriptimi për detyra të përsëritura, dhe zakonisht kërkon më pak burime kompjuterike.</text:span></text:p>
              </text:list-item>
            </text:list>
          </draw:text-box>
        </draw:frame>
        <presentation:notes draw:style-name="dp2">
          <draw:page-thumbnail draw:style-name="gr2" draw:layer="layout" svg:width="18.623cm" svg:height="10.476cm" svg:x="1.483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_20_1" presentation:presentation-page-layout-name="AL1T1">
        <draw:frame draw:name="PlaceHolder 1" presentation:style-name="pr2" draw:text-style-name="P11" draw:layer="layout" svg:width="25.198cm" svg:height="13.969cm" svg:x="1.4cm" svg:y="1.27cm" presentation:class="outline" presentation:user-transformed="true">
          <draw:text-box>
            <text:list text:style-name="L7">
              <text:list-item>
                <text:p text:style-name="P12"><text:span text:style-name="T32"><text:s text:c="3"/></text:span><text:span text:style-name="T33">Përdorimi i të dyve:</text:span><text:span text:style-name="T32"> Shumë sisteme moderne mbështesin dhe CLI dhe GUI. Për shembull, mund të hapni një terminal brenda mjedisit grafik: në Windows shtypni </text:span><text:span text:style-name="T34">Win+R, shkruani cmd dhe hapni Command Prompt; në Ubuntu hapni aplikacionin "Terminal".</text:span></text:p>
              </text:list-item>
            </text:list>
            <text:list text:style-name="L8">
              <text:list-item>
                <text:p text:style-name="P19"><text:span text:style-name="T35">Shembull praktik:</text:span><text:span text:style-name="T36"> Në Linux, hapni terminalin dhe shkruani echo "Përshëndetje nga CLI". Teksti do të shfaqet në linjën e komandës. Në Windows, hapni aplikacionin Paint nga menuja Start dhe vizatoni me maus në dritare për të parë ndërfaqen grafike në veprim.</text:span></text:p>
              </text:list-item>
            </text:list>
          </draw:text-box>
        </draw:frame>
        <presentation:notes draw:style-name="dp2">
          <draw:page-thumbnail draw:style-name="gr2" draw:layer="layout" svg:width="18.623cm" svg:height="10.476cm" svg:x="1.483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_20_1" presentation:presentation-page-layout-name="AL1T1">
        <draw:frame draw:name="PlaceHolder 1" presentation:style-name="pr2" draw:text-style-name="P11" draw:layer="layout" svg:width="25.198cm" svg:height="14.604cm" svg:x="1.4cm" svg:y="0.635cm" presentation:class="outline" presentation:user-transformed="true">
          <draw:text-box>
            <text:list text:style-name="L4">
              <text:list-item>
                <text:p text:style-name="P10"><text:span text:style-name="T13"><text:s text:c="3"/></text:span><text:span text:style-name="T12">Ushtrim:</text:span><text:span text:style-name="T13"> Eksperimentoni me GUI/CLI: krijoni një skedar të ri përmes ndërfaqes grafike (klikoni djathtas në desktop &gt; New &gt; Text Document). Pastaj hapni terminalin/Command Prompt-in dhe verifikoni që skedari ekziston duke shkruar dir (Windows) ose ls (Linux). Jepni komandën për ta fshirë skedarin nga CLI (p.sh. del Prova.txt në Windows ose rm Prova.txt në Linux) dhe analizoni ndryshimin në ndërfaqen grafike.</text:span></text:p>
              </text:list-item>
            </text:list>
          </draw:text-box>
        </draw:frame>
        <presentation:notes draw:style-name="dp2">
          <draw:page-thumbnail draw:style-name="gr2" draw:layer="layout" svg:width="18.623cm" svg:height="10.476cm" svg:x="1.483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DejaVu Serif" svg:font-family="'DejaVu Serif'" style:font-family-generic="roman" style:font-pitch="variable"/>
    <style:font-face style:name="DejaVu Serif1" svg:font-family="'DejaVu Serif'"/>
    <style:font-face style:name="Liberation Mono" svg:font-family="'Liberation Mono', 'Courier New'"/>
    <style:font-face style:name="Liberation Sans" svg:font-family="'Liberation Sans'" style:font-family-generic="roman" style:font-pitch="variable"/>
    <style:font-face style:name="Liberation Serif" svg:font-family="'Liberation Serif', 'Times New 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Devanagari" svg:font-family="'Noto Sans Devanagari'" style:font-family-generic="system" style:font-pitch="variable"/>
    <style:font-face style:name="Noto Sans Mono CJK SC" svg:font-family="'Noto Sans Mono CJK SC'"/>
    <style:font-face style:name="Noto Sans1" svg:font-family="'Noto Sans'" style:font-family-generic="system" style:font-pitch="variable"/>
    <style:font-face style:name="Noto Serif CJK SC" svg:font-family="'Noto Serif CJK SC'"/>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faul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Mpr1" draw:text-style-name="MP6" draw:layer="backgroundobjects" svg:width="8.874cm" svg:height="1.084cm" svg:x="9.576cm" svg:y="14.348cm" presentation:class="footer" presentation:user-transformed="true">
        <draw:text-box>
          <text:p text:style-name="MP5"><text:span text:style-name="MT1"><presentation:footer/></text:span></text:p>
        </draw:text-box>
      </draw:frame>
      <draw:frame draw:name="PlaceHolder 2" presentation:style-name="Mpr1" draw:text-style-name="MP6" draw:layer="backgroundobjects" svg:width="6.522cm" svg:height="1.084cm" svg:x="20.076cm" svg:y="14.348cm" presentation:class="page-number" presentation:user-transformed="true">
        <draw:text-box>
          <text:p text:style-name="MP7"><text:span text:style-name="MT1"><text:page-number>&lt;number&gt;</text:page-number></text:span></text:p>
        </draw:text-box>
      </draw:frame>
      <draw:frame draw:name="PlaceHolder 3" presentation:style-name="Mpr1" draw:text-style-name="MP6" draw:layer="backgroundobjects" svg:width="6.522cm" svg:height="1.084cm" svg:x="1.4cm" svg:y="14.348cm" presentation:class="date-time" presentation:user-transformed="true">
        <draw:text-box>
          <text:p text:style-name="MP1"><presentation:date-time/></text:p>
        </draw:text-box>
      </draw:frame>
      <draw:frame presentation:style-name="Default-title" draw:layer="backgroundobjects" svg:width="25.2cm" svg:height="2.629cm" svg:x="1.4cm" svg:y="0.628cm" presentation:class="title" presentation:placeholder="true">
        <draw:text-box/>
      </draw:frame>
      <draw:frame presentation:style-name="Default-outline1" draw:layer="backgroundobjects" svg:width="25.2cm" svg:height="9.135cm" svg:x="1.4cm" svg:y="3.685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Default_20_1-title" draw:layer="backgroundobjects" svg:width="25.198cm" svg:height="2.628cm" svg:x="1.4cm" svg:y="0.628cm" presentation:class="title" presentation:placeholder="true" presentation:user-transformed="true">
        <draw:text-box/>
      </draw:frame>
      <draw:frame draw:name="PlaceHolder 2" presentation:style-name="Default_20_1-outline1" draw:layer="backgroundobjects" svg:width="25.198cm" svg:height="9.133cm" svg:x="1.4cm" svg:y="3.685cm" presentation:class="outline" presentation:placeholder="true" presentation:user-transformed="true">
        <draw:text-box/>
      </draw:frame>
      <draw:frame draw:name="PlaceHolder 3" presentation:style-name="Mpr4" draw:text-style-name="MP6" draw:layer="backgroundobjects" svg:width="8.874cm" svg:height="1.084cm" svg:x="9.576cm" svg:y="14.348cm" presentation:class="footer" presentation:user-transformed="true">
        <draw:text-box>
          <text:p text:style-name="MP5"><text:span text:style-name="MT1"><presentation:footer/></text:span></text:p>
        </draw:text-box>
      </draw:frame>
      <draw:frame draw:name="PlaceHolder 4" presentation:style-name="Mpr4" draw:text-style-name="MP6" draw:layer="backgroundobjects" svg:width="6.522cm" svg:height="1.084cm" svg:x="20.076cm" svg:y="14.348cm" presentation:class="page-number" presentation:user-transformed="true">
        <draw:text-box>
          <text:p text:style-name="MP7"><text:span text:style-name="MT1"><text:page-number>&lt;number&gt;</text:page-number></text:span></text:p>
        </draw:text-box>
      </draw:frame>
      <draw:frame draw:name="PlaceHolder 5" presentation:style-name="Mpr4" draw:text-style-name="MP6" draw:layer="backgroundobjects" svg:width="6.522cm" svg:height="1.084cm" svg:x="1.4cm" svg:y="14.348cm" presentation:class="date-time" presentation:user-transformed="true">
        <draw:text-box>
          <text:p text:style-name="MP1"><presentation:date-time/></text:p>
        </draw:text-box>
      </draw:frame>
      <presentation:notes style:page-layout-name="PM0">
        <draw:page-thumbnail presentation:style-name="Default_20_1-title" draw:layer="backgroundobjects" svg:width="0cm" svg:height="0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8T14:23:35</meta:creation-date>
    <dc:language>en-US</dc:language>
    <dc:date>2025-09-28T16:51:15.197125580</dc:date>
    <meta:editing-cycles>15</meta:editing-cycles>
    <meta:editing-duration>PT50M11S</meta:editing-duration>
    <meta:generator>LibreOffice/24.2.7.2$Linux_X86_64 LibreOffice_project/420$Build-2</meta:generator>
    <meta:document-statistic meta:object-count="83"/>
    <meta:user-defined meta:name="AppVersion">15.0000</meta:user-defined>
  </office:meta>
</office:document-meta>
</file>